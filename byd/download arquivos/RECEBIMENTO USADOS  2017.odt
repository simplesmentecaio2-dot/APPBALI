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4000000140F40347D7103BAD35.jpg" manifest:media-type="image/jpeg"/>
  <manifest:file-entry manifest:full-path="Pictures/100000000000007B00000030AF3F44324B3C25FB.png" manifest:media-type="image/png"/>
  <manifest:file-entry manifest:full-path="Pictures/100000000000005B0000005627838239BE351A6D.jpg" manifest:media-type="image/jpeg"/>
  <manifest:file-entry manifest:full-path="Pictures/10000000000001CD0000002C7A5245DD01B498CC.png" manifest:media-type="image/png"/>
  <manifest:file-entry manifest:full-path="Pictures/10000000000001540000007F6206A387461B3AD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7.62cm" style:type="center"/>
          <style:tab-stop style:position="17.253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7.62cm" style:type="center"/>
          <style:tab-stop style:position="17.253cm" style:type="right"/>
        </style:tab-stops>
      </style:paragraph-properties>
      <style:text-properties fo:color="#0000ff" fo:font-size="8pt" style:font-size-asian="8pt"/>
    </style:style>
    <style:style style:name="P3" style:family="paragraph" style:parent-style-name="Normal">
      <style:paragraph-properties fo:text-align="center" style:justify-single-word="false"/>
      <style:text-properties fo:font-size="14pt" style:font-size-asian="14pt"/>
    </style:style>
    <style:style style:name="P4" style:family="paragraph" style:parent-style-name="Normal">
      <style:text-properties fo:font-weight="bold" style:font-weight-asian="bold"/>
    </style:style>
    <style:style style:name="P5" style:family="paragraph" style:parent-style-name="Normal">
      <style:text-properties fo:font-weight="bold" style:font-weight-asian="bold" style:font-weight-complex="bold"/>
    </style:style>
    <style:style style:name="P6" style:family="paragraph" style:parent-style-name="Normal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7" style:family="paragraph" style:parent-style-name="Normal">
      <style:text-properties fo:font-size="12pt" style:font-size-asian="12pt" style:font-size-complex="12pt"/>
    </style:style>
    <style:style style:name="P8" style:family="paragraph" style:parent-style-name="Normal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Normal">
      <style:paragraph-properties fo:line-height="100%" fo:text-align="justify" style:justify-single-word="false"/>
      <style:text-properties fo:color="#ff0000" fo:font-size="12pt" style:font-size-asian="12pt" style:font-size-complex="12pt"/>
    </style:style>
    <style:style style:name="P10" style:family="paragraph" style:parent-style-name="Normal">
      <style:text-properties fo:font-size="6pt" fo:font-weight="bold" style:font-size-asian="6pt" style:font-weight-asian="bold" style:font-size-complex="6pt"/>
    </style:style>
    <style:style style:name="P11" style:family="paragraph" style:parent-style-name="Normal">
      <style:text-properties fo:font-size="6pt" fo:font-weight="bold" style:font-size-asian="6pt" style:font-weight-asian="bold" style:font-size-complex="6pt" style:font-weight-complex="bold"/>
    </style:style>
    <style:style style:name="P12" style:family="paragraph" style:parent-style-name="Normal">
      <style:text-properties fo:font-size="6pt" style:font-size-asian="6pt" style:font-size-complex="6pt"/>
    </style:style>
    <style:style style:name="P13" style:family="paragraph" style:parent-style-name="Normal">
      <style:text-properties fo:font-size="6pt" fo:language="en" fo:country="US" fo:font-weight="bold" style:font-size-asian="6pt" style:font-weight-asian="bold" style:font-size-complex="6pt"/>
    </style:style>
    <style:style style:name="P14" style:family="paragraph" style:parent-style-name="Standard">
      <style:text-properties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>
      <loext:graphic-properties draw:fill="none"/>
      <style:text-properties fo:font-size="12pt"/>
    </style:style>
    <style:style style:name="P17" style:family="paragraph">
      <loext:graphic-properties draw:fill="solid" draw:fill-color="#ffffff" draw:opacity="100%"/>
      <style:text-properties fo:font-size="12pt"/>
    </style:style>
    <style:style style:name="T1" style:family="text">
      <style:text-properties fo:color="#0000ff" fo:font-size="8pt" style:font-size-asian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2pt"/>
    </style:style>
    <style:style style:name="T5" style:family="text">
      <style:text-properties fo:font-size="14pt" officeooo:rsid="0017a26a" style:font-size-asian="14pt" style:font-size-complex="12pt"/>
    </style:style>
    <style:style style:name="T6" style:family="text">
      <style:text-properties fo:font-size="14pt" officeooo:rsid="00188269" style:font-size-asian="14pt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34f8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T15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646cm, 0.619cm, 0.542cm, 0.60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fo:clip="rect(0cm, 0cm, 0cm, 0cm)" style:mirror="none" style:run-through="foreground"/>
    </style:style>
    <style:style style:name="gr3" style:family="graphic">
      <style:graphic-properties draw:stroke="none" draw:fill="solid" draw:fill-color="#ffffff" draw:opacity="100%" fo:clip="rect(0cm, 0cm, 0cm, 0cm)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g text:anchor-type="paragraph" draw:z-index="0" draw:name="Group 1" draw:style-name="gr1"><draw:frame draw:name="Figuras 1" draw:style-name="gr2" draw:text-style-name="P16" svg:width="11.367cm" svg:height="0.87cm" svg:x="3.74cm" svg:y="0.355cm"><draw:image xlink:href="Pictures/10000000000001CD0000002C7A5245DD01B498CC.png" xlink:type="simple" xlink:show="embed" xlink:actuate="onLoad"><text:p/></draw:image></draw:frame><draw:frame draw:name="Figuras 2" draw:style-name="gr2" draw:text-style-name="P16" svg:width="1.412cm" svg:height="1.267cm" svg:x="15.524cm" svg:y="0.191cm"><draw:image xlink:href="Pictures/100000000000005B0000005627838239BE351A6D.jpg" xlink:type="simple" xlink:show="embed" xlink:actuate="onLoad"><text:p/></draw:image></draw:frame><draw:frame draw:name="bali sua concessionária" draw:style-name="gr3" draw:text-style-name="P17" svg:width="3.125cm" svg:height="1.086cm" svg:x="0.219cm" svg:y="0.311cm"><draw:image xlink:href="Pictures/10000000000001540000007F6206A387461B3AD1.jpg" xlink:type="simple" xlink:show="embed" xlink:actuate="onLoad"><text:p/></draw:image></draw:frame></draw:g></text:p>
      <text:p text:style-name="P14"/>
      <text:p text:style-name="P15"><text:s/><text:span text:style-name="Fonte_20_parág._20_padrão"><text:span text:style-name="T3">RECEBIMENTO DE VEÍCULO </text:span></text:span></text:p>
      <text:p text:style-name="P15"><text:span text:style-name="Fonte_20_parág._20_padrão"><text:span text:style-name="T2">PLACA:</text:span></text:span><text:span text:style-name="Fonte_20_parág._20_padrão"><text:span text:style-name="T4"> </text:span></text:span><text:span text:style-name="Fonte_20_parág._20_padrão"><text:span text:style-name="T6">JKN-4300</text:span></text:span></text:p>
      <text:p text:style-name="P3"/>
      <text:p text:style-name="P8">DOCUMENTOS OBRIGATÓRIOS:</text:p>
      <text:p text:style-name="P11"/>
      <text:p text:style-name="Normal"><text:span text:style-name="Fonte_20_parág._20_padrão"><text:span text:style-name="T7">1</text:span></text:span> – <text:span text:style-name="Fonte_20_parág._20_padrão"><text:span text:style-name="T7">VEÍCULOS SEM RESERVA OU CDC : </text:span></text:span><text:span text:style-name="Fonte_20_parág._20_padrão"><text:span text:style-name="T10">DUT EM BRANCO</text:span></text:span><text:span text:style-name="Fonte_20_parág._20_padrão"><text:span text:style-name="T7">, 2 VIAS <text:s/></text:span></text:span>PROCURAÇÃO PÚBLICA PARA BALI BRASÍLIA AUTOMÓVEIS LTDA <text:span text:style-name="Fonte_20_parág._20_padrão"><text:span text:style-name="T7">(SEM -VEDAR O SUBSTABELECIMENTO), E SEM DATA DE VENCIMENTO.</text:span></text:span></text:p>
      <text:p text:style-name="P10"/>
      <text:p text:style-name="P4"><text:s/>1.2 - LEASING: </text:p>
      <text:p text:style-name="P6">- DUT EM BRANCO</text:p>
      <text:p text:style-name="Normal"><text:span text:style-name="Fonte_20_parág._20_padrão"><text:span text:style-name="T7">- 2 VIAS <text:s/></text:span></text:span>PROCURAÇÃO PÚBLICA PARA BALI BRASÍLIA AUTOMÓVEIS LTDA <text:span text:style-name="Fonte_20_parág._20_padrão"><text:span text:style-name="T7">(SEM VEDAR O SUBSTABELECIMENTO), E SEM DATA DE VENCIMENTO.</text:span></text:span></text:p>
      <text:p text:style-name="P12"/>
      <text:p text:style-name="Normal"><text:span text:style-name="Fonte_20_parág._20_padrão"><text:span text:style-name="T7">1.3</text:span></text:span>- <text:span text:style-name="Fonte_20_parág._20_padrão"><text:span text:style-name="T8">LEASING BCO FIAT/ ITAÚ</text:span></text:span> : </text:p>
      <text:p text:style-name="Normal">-<text:span text:style-name="Fonte_20_parág._20_padrão"><text:span text:style-name="T7">A </text:span></text:span><text:span text:style-name="Fonte_20_parág._20_padrão"><text:span text:style-name="T8">PROCURAÇÃO </text:span></text:span>DEVE SER FEITA NO CARTÓRIO DO 1° OFÍCIO (MAURICIO DE LEMOS) QUE FICA LOCALIZADO NA 505 SUL BL ‘C’ LJ 1/2</text:p>
      <text:p text:style-name="Normal">- <text:span text:style-name="Fonte_20_parág._20_padrão"><text:span text:style-name="T10">DUT EM BRANCO</text:span></text:span></text:p>
      <text:p text:style-name="Normal"><text:span text:style-name="Fonte_20_parág._20_padrão"><text:span text:style-name="T14"/></text:span></text:p>
      <text:p text:style-name="P5">1.4 – LEASING BCO FINASA/BRADESCO S/A</text:p>
      <text:p text:style-name="P5">-<text:span text:style-name="T11"> DUT EM BRANCO</text:span></text:p>
      <text:p text:style-name="Normal">- <text:span text:style-name="Fonte_20_parág._20_padrão"><text:span text:style-name="T7">2 VIAS <text:s/></text:span></text:span>PROCURAÇÃO PÚBLICA PARA BALI BRASÍLIA AUTOMÓVEIS LTDA <text:span text:style-name="Fonte_20_parág._20_padrão"><text:span text:style-name="T7">(SEM VEDAR O SUBSTABELECIMENTO), SEM DATA DE VENCIMENTO E RECONHECIMENTO DE FIRMA DA ASSINATURA DO <text:s/>CLIENTE NO TERMO DE REPASSE, A SER ENVIADO AO BANCO.</text:span></text:span></text:p>
      <text:p text:style-name="P12"/>
      <text:p text:style-name="Normal"><text:span text:style-name="Fonte_20_parág._20_padrão"><text:span text:style-name="T7">2 – </text:span></text:span><text:span text:style-name="Fonte_20_parág._20_padrão"><text:span text:style-name="T8">LICENCIAMENTO 201</text:span></text:span><text:span text:style-name="Fonte_20_parág._20_padrão"><text:span text:style-name="T9">7</text:span></text:span></text:p>
      <text:p text:style-name="P11"/>
      <text:p text:style-name="P5">3 – <text:s/>IPVA 2017 (1ª COTA), (2ª COTA), (3ª COTA), (4ª COTA), SEG. OBRIGATÓRIO E LICENCIAMENTO 2017 <text:s/>PAGOS, </text:p>
      <text:p text:style-name="P5">Obs.(1): CASO POSSUA PARCELAMENTO DO IPVA OU EM DÍVIDA ATIVA, A RESPONSABILIDADE FICA FACULTADA AO CLIENTE DE SE DIRIGIR A SECRETARIA DE FAZENDA PARA QUITAR E OU SOLICITAR OS BOLETOS PARA PAGAMENTO.</text:p>
      <text:p text:style-name="P11"/>
      <text:p text:style-name="P5">Obs.(2): <text:s/>OS VEÍCULOS QUE FORAM CONTEMPLADOS COM A ISENÇÃO DE IPVA ATRAVÉS DA LEI Nº 4.733/2011 NOS ANOS 2016/2017 <text:s/>E FOREM NEGOCIADOS DENTRO DO MESMO ANO, DEVERÃO TER O IPVA PAGO PELO PROPRIETÁRIO ATUAL.</text:p>
      <text:p text:style-name="P11"/>
      <text:p text:style-name="P5">4- MULTAS DO DETRAN EM NOTIFICAÇÃO, SUBJUDICE E DEFESA PRÉVIA DEVERÃO SER ATIVADAS PELO CLIENTE ANTES DA ENTREGA PARA BALI AUTOMÓVEIS.</text:p>
      <text:p text:style-name="P11"/>
      <text:p text:style-name="Normal"><text:span text:style-name="Fonte_20_parág._20_padrão"><text:span text:style-name="T13">5 – QUITAR DÉBITOS (DETRAN/DNIT/DPRF/AGETOP-GO</text:span></text:span><text:span text:style-name="Fonte_20_parág._20_padrão"><text:span text:style-name="T12">)</text:span></text:span></text:p>
      <text:p text:style-name="P13"/>
      <text:p text:style-name="P4">6 – VEÍCULOS DE OUTRA UF DEVERÃO SER TRANSFERIDOS ANTES DA ENTREGA PARA BALI.</text:p>
      <text:p text:style-name="P10"/>
      <text:p text:style-name="P4">7 – TODO VEÍCULO GNV ( A GÁS ) SERÁ RECEBIDO APENAS, COM O CERTIFICADO DE VALIDADE DE 1 ANO, EMITIDO PELA FINATEC ( UNB ).</text:p>
      <text:p text:style-name="Normal"/>
      <text:p text:style-name="Normal"><text:span text:style-name="Fonte_20_parág._20_padrão"><text:span text:style-name="T8">8 -ITENS OBRIGATÓRIOS DO VEÍCULO ( CASO NÃO TENHA)</text:span></text:span>:</text:p>
      <text:p text:style-name="Normal"><text:s/>– MANUAL DE USO DO VEÍCULO E MANUAL DE REVISÕES (R$ 120,00)</text:p>
      <text:p text:style-name="Normal"><text:s/>– CHAVE SIMPLES RESERVA (R$ 180, 00) / CARTÃO CODE <text:s text:c="2"/>(R$ 14,00 )</text:p>
      <text:p text:style-name="Normal"><text:s/>– CHAVE CANIVETE (450,00) GAMA FIAT, EXCETO FREEMONT, EM CASO DE OUTRAS MARCAS CONSULTAR CONCESSIONÁRIA.</text:p>
      <text:p text:style-name="Normal"><text:s/>– EXTINTOR DENTRO DA VALIDADE, MACACO, CHAVE DE RODA, TRIÂNGULO E ESTEPE.</text:p>
      <text:p text:style-name="P12"/>
      <text:p text:style-name="P4">9 - ENTREGAR O VEÍCULO NAS CONDIÇÕES AVALIADAS.</text:p>
      <text:p text:style-name="P10"/>
      <text:p text:style-name="P5">10 –TAXAS :</text:p>
      <text:p text:style-name="Normal">1 – 2° VIA DO DUT <text:s text:c="27"/>R$ 450,00</text:p>
      <text:p text:style-name="Normal">2 – TRANSFERÊNCIA <text:s text:c="22"/>R$ 990,00</text:p>
      <text:p text:style-name="Normal">3 – 2° VIA DE LICENCIAMENTO <text:s text:c="3"/>R$ 250,00 <text:s/></text:p>
      <text:p text:style-name="P12"/>
      <text:p text:style-name="P9">O CLIENTE compromete-se a entregar em Dação em Pagamento o veículo Usado Placa_____________, conforme negociação descrita no contrato de compra e venda sob pena de não ser concretizada, nos termos, condições e benefícios negociados na compra.</text:p>
      <text:p text:style-name="P7">Brasília _____ de ________________de 2017.</text:p>
      <text:p text:style-name="P7"/>
      <text:p text:style-name="P7">Cliente :</text:p>
      <text:p text:style-name="Normal"><text:span text:style-name="Fonte_20_parág._20_padrão"><text:span text:style-name="T2">CPF : <text:s text:c="4"/></text:span></text:span></text:p>
      <text:p text:style-name="Normal"><text:span text:style-name="Fonte_20_parág._20_padrão"><text:span text:style-name="T2"/></text:span></text:p>
      <text:p text:style-name="Normal"><text:span text:style-name="Fonte_20_parág._20_padrão"><text:span text:style-name="T15">___________________________________________________________________________________________</text:span></text:span></text:p>
      <text:p text:style-name="Normal"><text:span text:style-name="Fonte_20_parág._20_padrão"><text:span text:style-name="T2"><text:s text:c="33"/>ASSINATUR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Normal" style:class="chapter">
      <style:paragraph-properties fo:margin-top="0.423cm" fo:margin-bottom="0.212cm" loext:contextual-spacing="false" fo:text-align="center" style:justify-single-word="false" fo:hyphenation-ladder-count="no-limit" fo:keep-with-next="always"/>
      <style:text-properties style:font-name="Arial" fo:font-family="Arial" style:font-family-generic="swiss" style:font-pitch="variable" fo:font-size="20pt" fo:font-weight="bold" style:font-name-asian="Arial Unicode MS" style:font-family-asian="'Arial Unicode MS'" style:font-family-generic-asian="system" style:font-pitch-asian="variable" style:font-size-asian="20pt" style:font-weight-asian="bold" style:font-name-complex="Tahoma" style:font-family-complex="Tahoma" style:font-family-generic-complex="system" style:font-pitch-complex="variable" style:font-size-complex="14pt" style:font-weight-complex="bold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Normal" style:next-style-name="Normal" style:default-outline-level="1" style:class="text">
      <style:paragraph-properties fo:text-align="center" style:justify-single-word="false" fo:hyphenation-ladder-count="no-limit" fo:keep-with-next="always"/>
      <style:text-properties fo:font-size="16pt" style:font-size-asian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text-align="center" style:justify-single-word="false" fo:hyphenation-ladder-count="no-limit" fo:keep-with-next="always"/>
      <style:text-properties fo:font-size="12pt" fo:font-weight="bold" style:font-size-asian="12pt" style:font-weight-asian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text-align="center" style:justify-single-word="false" fo:hyphenation-ladder-count="no-limit" fo:keep-with-next="always"/>
      <style:text-properties fo:font-size="12pt" style:font-size-asian="12pt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text-align="justify" style:justify-single-word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text-align="justify" style:justify-single-word="false" fo:hyphenation-ladder-count="no-limit" fo:keep-with-next="always"/>
      <style:text-properties fo:font-size="12pt" fo:font-style="italic" style:font-size-asian="12pt" style:font-style-asian="italic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hyphenation-ladder-count="no-limit" fo:keep-with-next="always"/>
      <style:text-properties fo:font-size="12pt" style:font-size-asian="12pt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text-align="end" style:justify-single-word="false" fo:hyphenation-ladder-count="no-limit" fo:keep-with-next="always"/>
      <style:text-properties fo:font-size="14pt" style:font-size-asian="14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hyphenation-ladder-count="no-limit" fo:keep-with-next="always"/>
      <style:text-properties fo:font-size="12pt" fo:font-weight="bold" style:font-size-asian="12pt" style:font-weight-asian="bold" style:font-weight-complex="bold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text-align="justify" style:justify-single-word="false" fo:hyphenation-ladder-count="no-limit" fo:keep-with-next="always"/>
      <style:text-properties fo:font-size="14pt" fo:font-weight="bold" style:font-size-asian="14pt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8.503cm" fo:margin-left="-1.06cm" table:align="left"/>
    </style:style>
    <style:style style:name="Tabela1.A" style:family="table-column">
      <style:table-column-properties style:column-width="3.002cm"/>
    </style:style>
    <style:style style:name="Tabela1.B" style:family="table-column">
      <style:table-column-properties style:column-width="12.002cm"/>
    </style:style>
    <style:style style:name="Tabela1.C" style:family="table-column">
      <style:table-column-properties style:column-width="3.5cm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2" style:family="table">
      <style:table-properties style:width="18.503cm" fo:margin-left="-1.06cm" table:align="left"/>
    </style:style>
    <style:style style:name="Tabela2.A" style:family="table-column">
      <style:table-column-properties style:column-width="18.503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paragraph-properties fo:text-align="center" style:justify-single-word="false">
        <style:tab-stops>
          <style:tab-stop style:position="7.62cm" style:type="center"/>
          <style:tab-stop style:position="17.253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7.62cm" style:type="center"/>
          <style:tab-stop style:position="17.253cm" style:type="right"/>
        </style:tab-stops>
      </style:paragraph-properties>
      <style:text-properties fo:color="#0000ff" fo:font-size="8pt" style:font-size-asian="8pt"/>
    </style:style>
    <style:style style:name="MT1" style:family="text">
      <style:text-properties fo:color="#0000ff" fo:font-size="8pt" style:font-size-asian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646cm, 0.619cm, 0.542cm, 0.60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35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981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-1.27cm" fo:margin-left="0cm" fo:margin-right="0cm" fo:margin-bottom="0cm" style:dynamic-spacing="true"/>
      </style:header-style>
      <style:footer-style>
        <style:header-footer-properties fo:min-height="-1.98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Header"><draw:frame draw:style-name="Mfr1" draw:name="Imagem 1" text:anchor-type="as-char" svg:y="0cm" svg:width="2.646cm" style:rel-width="scale" svg:height="1.27cm" style:rel-height="scale" draw:z-index="0"><draw:image xlink:href="Pictures/100000000000007B00000030AF3F44324B3C25FB.png" xlink:type="simple" xlink:show="embed" xlink:actuate="onLoad"/><svg:desc>conces</svg:desc></draw:frame></text:p>
            </table:table-cell>
            <table:table-cell table:style-name="Tabela1.A1" office:value-type="string">
              <text:p text:style-name="Header"><draw:frame draw:style-name="Mfr1" draw:name="Imagem 2" text:anchor-type="as-char" svg:y="0cm" svg:width="13.414cm" style:rel-width="scale" svg:height="0.953cm" style:rel-height="scale" draw:z-index="0"><draw:image xlink:href="Pictures/10000000000001CD0000002C7A5245DD01B498CC.png" xlink:type="simple" xlink:show="embed" xlink:actuate="onLoad"/></draw:frame></text:p>
            </table:table-cell>
            <table:table-cell table:style-name="Tabela1.A1" office:value-type="string">
              <text:p text:style-name="Header"><text:s text:c="10"/><draw:frame draw:style-name="Mfr2" draw:name="Picture 2" text:anchor-type="as-char" svg:y="0cm" svg:width="1.429cm" style:rel-width="scale" svg:height="1.27cm" style:rel-height="scale" draw:z-index="0"><draw:image xlink:href="Pictures/100000000000014000000140F40347D7103BAD35.jpg" xlink:type="simple" xlink:show="embed" xlink:actuate="onLoad"/><svg:desc>Descrição: http://upload.wikimedia.org/wikipedia/pt/7/70/Fiat_logo.jpg</svg:desc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MP1"><text:span text:style-name="Fonte_20_parág._20_padrão"><text:span text:style-name="MT1">SIA/SUL Trecho 03 Lt. 725/895 - FONE</text:span></text:span><text:span text:style-name="Fonte_20_parág._20_padrão"><text:span text:style-name="MT1">: (61) 3362-6200 - FAX: (61)3362-6222 <text:s/>- CEP 71.200-030 - Guará-DF <text:s/>- Internet: <text:s/>www.bali.com.br</text:span></text:span></text:p>
            </table:table-cell>
          </table:table-row>
        </table:table>
        <text:p text:style-name="MP2">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 LibreOffice_project/89f508ef3ecebd2cfb8e1def0f0ba9a803b88a6d</meta:generator>
    <dc:title>ATESTADO CAPACIDADE</dc:title>
    <dc:subject/>
    <meta:initial-creator>bali</meta:initial-creator>
    <meta:creation-date>2015-02-20T10:56:00Z</meta:creation-date>
    <dc:date>2018-01-06T16:52:28.097000000</dc:date>
    <meta:print-date>2017-12-16T14:29:23.790000000</meta:print-date>
    <meta:editing-cycles>44</meta:editing-cycles>
    <meta:editing-duration>PT9H45M28S</meta:editing-duration>
    <meta:document-statistic meta:table-count="2" meta:image-count="3" meta:object-count="0" meta:page-count="1" meta:paragraph-count="42" meta:word-count="440" meta:character-count="2866" meta:non-whitespace-character-count="2322"/>
    <meta:template xlink:type="simple" xlink:actuate="onRequest" xlink:title="" xlink:href="./Timbrado%20Bali%202006.dot"/>
  </office:meta>
</office:document-meta>
</file>